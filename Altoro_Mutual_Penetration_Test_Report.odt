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style:style style:name="PT_Table" style:family="table" style:display-name="PT_Table">
      <style:table-properties style:width="17cm" table:align="center"/>
    </style:style>
    <style:style style:name="PT_HeaderCell" style:family="table-cell" style:display-name="PT_HeaderCell">
      <style:table-cell-properties fo:background-color="#1F3864" fo:border="0.5pt solid #FFFFFF" fo:padding="0.15cm" style:vertical-align="middle"/>
    </style:style>
    <style:style style:name="PT_BodyCell" style:family="table-cell" style:display-name="PT_BodyCell">
      <style:table-cell-properties fo:border="0.5pt solid #B4C6E7" fo:padding="0.15cm" style:vertical-align="middle"/>
    </style:style>
    <style:style style:name="PT_BodyCellAlt" style:family="table-cell" style:display-name="PT_BodyCellAlt">
      <style:table-cell-properties fo:background-color="#EAF1FB" fo:border="0.5pt solid #B4C6E7" fo:padding="0.15cm" style:vertical-align="middle"/>
    </style:style>
    <style:style style:name="PT_CritCell" style:family="table-cell" style:display-name="PT_CritCell">
      <style:table-cell-properties fo:background-color="#7030A0" fo:border="0.5pt solid #B4C6E7" fo:padding="0.15cm" style:vertical-align="middle"/>
    </style:style>
    <style:style style:name="PT_HighCell" style:family="table-cell" style:display-name="PT_HighCell">
      <style:table-cell-properties fo:background-color="#FF0000" fo:border="0.5pt solid #B4C6E7" fo:padding="0.15cm" style:vertical-align="middle"/>
    </style:style>
    <style:style style:name="PT_MedCell" style:family="table-cell" style:display-name="PT_MedCell">
      <style:table-cell-properties fo:background-color="#FFA500" fo:border="0.5pt solid #B4C6E7" fo:padding="0.15cm" style:vertical-align="middle"/>
    </style:style>
    <style:style style:name="PT_LowCell" style:family="table-cell" style:display-name="PT_LowCell">
      <style:table-cell-properties fo:background-color="#FFFF00" fo:border="0.5pt solid #B4C6E7" fo:padding="0.15cm" style:vertical-align="middle"/>
    </style:style>
    <style:style style:name="ScopeTable_col0" style:family="table-column" style:display-name="ScopeTable_col0">
      <style:table-column-properties style:column-width="3.5cm"/>
    </style:style>
    <style:style style:name="ScopeTable_col1" style:family="table-column" style:display-name="ScopeTable_col1">
      <style:table-column-properties style:column-width="13.5cm"/>
    </style:style>
    <style:style style:name="RiskScaleTable_col0" style:family="table-column" style:display-name="RiskScaleTable_col0">
      <style:table-column-properties style:column-width="3cm"/>
    </style:style>
    <style:style style:name="RiskScaleTable_col1" style:family="table-column" style:display-name="RiskScaleTable_col1">
      <style:table-column-properties style:column-width="3cm"/>
    </style:style>
    <style:style style:name="RiskScaleTable_col2" style:family="table-column" style:display-name="RiskScaleTable_col2">
      <style:table-column-properties style:column-width="11cm"/>
    </style:style>
    <style:style style:name="FindingsSummaryTable_col0" style:family="table-column" style:display-name="FindingsSummaryTable_col0">
      <style:table-column-properties style:column-width="1.2cm"/>
    </style:style>
    <style:style style:name="FindingsSummaryTable_col1" style:family="table-column" style:display-name="FindingsSummaryTable_col1">
      <style:table-column-properties style:column-width="3cm"/>
    </style:style>
    <style:style style:name="FindingsSummaryTable_col2" style:family="table-column" style:display-name="FindingsSummaryTable_col2">
      <style:table-column-properties style:column-width="9.3cm"/>
    </style:style>
    <style:style style:name="FindingsSummaryTable_col3" style:family="table-column" style:display-name="FindingsSummaryTable_col3">
      <style:table-column-properties style:column-width="3.5cm"/>
    </style:style>
    <style:style style:name="RevisionTable_col0" style:family="table-column" style:display-name="RevisionTable_col0">
      <style:table-column-properties style:column-width="2.5cm"/>
    </style:style>
    <style:style style:name="RevisionTable_col1" style:family="table-column" style:display-name="RevisionTable_col1">
      <style:table-column-properties style:column-width="3cm"/>
    </style:style>
    <style:style style:name="RevisionTable_col2" style:family="table-column" style:display-name="RevisionTable_col2">
      <style:table-column-properties style:column-width="6cm"/>
    </style:style>
    <style:style style:name="RevisionTable_col3" style:family="table-column" style:display-name="RevisionTable_col3">
      <style:table-column-properties style:column-width="5.5cm"/>
    </style:style>
    <style:style style:name="ContactsTable_col0" style:family="table-column" style:display-name="ContactsTable_col0">
      <style:table-column-properties style:column-width="6cm"/>
    </style:style>
    <style:style style:name="ContactsTable_col1" style:family="table-column" style:display-name="ContactsTable_col1">
      <style:table-column-properties style:column-width="5.5cm"/>
    </style:style>
    <style:style style:name="ContactsTable_col2" style:family="table-column" style:display-name="ContactsTable_col2">
      <style:table-column-properties style:column-width="5.5cm"/>
    </style:style>
  </office:automatic-styles>
  <office:body>
    <office:text>
      <text:p text:style-name="CoverBgPara"/>
      <text:p text:style-name="CoverTitle"><text:span text:style-name="SpanBold"/></text:p>
      <text:p text:style-name="CoverBanner"><text:span text:style-name="BannerTitleSpan">Penetration Test Report</text:span></text:p>
      <text:p text:style-name="CoverBanner2"><text:span text:style-name="BannerSubSpan">Web Application Security Assessment – Altoro Mutual</text:span></text:p>
      <text:p text:style-name="PT_Body"/>
      <text:p text:style-name="PT_Body"/>
      <text:p text:style-name="CoverMeta"><text:span text:style-name="MetaLabelSpan">Prepared For:  </text:span><text:span text:style-name="MetaValSpan">Altoro Mutual (Demo Banking Application)</text:span></text:p>
      <text:p text:style-name="CoverMeta"><text:span text:style-name="MetaLabelSpan">Engagement Type:  </text:span><text:span text:style-name="MetaValSpan">Black-Box Web Application Penetration Test</text:span></text:p>
      <text:p text:style-name="CoverMeta"><text:span text:style-name="MetaLabelSpan">Prepared By:  </text:span><text:span text:style-name="MetaValSpan">TCS Cybersecurity Engineering Team</text:span></text:p>
      <text:p text:style-name="CoverMeta"><text:span text:style-name="MetaLabelSpan">Report Classification:  </text:span><text:span text:style-name="MetaValSpan">Confidential</text:span></text:p>
      <text:p text:style-name="CoverMeta"><text:span text:style-name="MetaLabelSpan">Report Status:  </text:span><text:span text:style-name="MetaValSpan">Final Report</text:span></text:p>
      <text:p text:style-name="CoverMeta"><text:span text:style-name="MetaLabelSpan">Date:  </text:span><text:span text:style-name="MetaValSpan">July 2026</text:span></text:p>
      <text:p text:style-name="PT_Body"/>
      <text:p text:style-name="CoverDisclaimer">This document contains confidential and proprietary information prepared for the intended recipient only. Altoro Mutual is a publicly available demonstration banking application used for security-testing training purposes; no real customer data or production systems are represented in this report.</text:p>
      <text:p text:style-name="PT_Body"/>
      <text:p text:style-name="PageBreak1"/>
      <text:h text:outline-level="1" text:style-name="PT_Heading1">Table of Contents</text:h>
      <text:p text:style-name="PT_TOCEntry">1. Executive Summary  <text:span text:style-name="SpanItalic">..................................................</text:span><text:span text:style-name="SpanBold">  3</text:span></text:p>
      <text:p text:style-name="PT_TOCEntry">     1.1 Scope of Engagement  <text:span text:style-name="SpanItalic">..........................................</text:span><text:span text:style-name="SpanBold">  3</text:span></text:p>
      <text:p text:style-name="PT_TOCEntry">     1.2 Objectives of the Engagement  <text:span text:style-name="SpanItalic">.................................</text:span><text:span text:style-name="SpanBold">  3</text:span></text:p>
      <text:p text:style-name="PT_TOCEntry">     1.3 Overall Risk Assessment  <text:span text:style-name="SpanItalic">......................................</text:span><text:span text:style-name="SpanBold">  3</text:span></text:p>
      <text:p text:style-name="PT_TOCEntry">2. Methodology  <text:span text:style-name="SpanItalic">........................................................</text:span><text:span text:style-name="SpanBold">  4</text:span></text:p>
      <text:p text:style-name="PT_TOCEntry">     2.1 Assessment Type  <text:span text:style-name="SpanItalic">..............................................</text:span><text:span text:style-name="SpanBold">  4</text:span></text:p>
      <text:p text:style-name="PT_TOCEntry">     2.2 Risk Assessment Methodology  <text:span text:style-name="SpanItalic">..................................</text:span><text:span text:style-name="SpanBold">  4</text:span></text:p>
      <text:p text:style-name="PT_TOCEntry">3. Summary of Findings  <text:span text:style-name="SpanItalic">................................................</text:span><text:span text:style-name="SpanBold">  5</text:span></text:p>
      <text:p text:style-name="PT_TOCEntry">4. Test Scenario / Reconnaissance  <text:span text:style-name="SpanItalic">.....................................</text:span><text:span text:style-name="SpanBold">  6</text:span></text:p>
      <text:p text:style-name="PT_TOCEntry">5. Detailed Findings  <text:span text:style-name="SpanItalic">..................................................</text:span><text:span text:style-name="SpanBold">  7</text:span></text:p>
      <text:p text:style-name="PT_TOCEntry">     5.1 Cross-Site Scripting (XSS) – Reflected  <text:span text:style-name="SpanItalic">.......................</text:span><text:span text:style-name="SpanBold">  7</text:span></text:p>
      <text:p text:style-name="PT_TOCEntry">     5.2 SQL Injection – Authentication Bypass  <text:span text:style-name="SpanItalic">........................</text:span><text:span text:style-name="SpanBold">  9</text:span></text:p>
      <text:p text:style-name="PT_TOCEntry">     5.3 HTML Injection  <text:span text:style-name="SpanItalic">...............................................</text:span><text:span text:style-name="SpanBold">  11</text:span></text:p>
      <text:p text:style-name="PT_TOCEntry">     5.4 Clickjacking  <text:span text:style-name="SpanItalic">.................................................</text:span><text:span text:style-name="SpanBold">  13</text:span></text:p>
      <text:p text:style-name="PT_TOCEntry">6. Conclusion  <text:span text:style-name="SpanItalic">.........................................................</text:span><text:span text:style-name="SpanBold">  15</text:span></text:p>
      <text:p text:style-name="PT_TOCEntry">7. Document Revision History  <text:span text:style-name="SpanItalic">..........................................</text:span><text:span text:style-name="SpanBold">  15</text:span></text:p>
      <text:p text:style-name="PT_TOCEntry">8. Contacts  <text:span text:style-name="SpanItalic">...........................................................</text:span><text:span text:style-name="SpanBold">  15</text:span></text:p>
      <text:p text:style-name="PageBreak1"/>
      <text:h text:outline-level="1" text:style-name="PT_Heading1">1. Executive Summary</text:h>
      <text:h text:outline-level="2" text:style-name="PT_Heading2">1.1 Scope of Engagement</text:h>
      <text:p text:style-name="PT_Body">TCS Cybersecurity Engineering was engaged to carry out a black-box penetration test of the Altoro Mutual online banking web application on behalf of the client. Testing was restricted to the assets explicitly authorized in the rules of engagement, which are summarized below.</text:p>
      <table:table table:name="ScopeTable" table:style-name="PT_Table">
        <table:table-column table:style-name="ScopeTable_col0"/>
        <table:table-column table:style-name="ScopeTable_col1"/>
        <table:table-row>
          <table:table-cell table:style-name="PT_HeaderCell">
            <text:p text:style-name="PT_HeaderCellText">Item</text:p>
          </table:table-cell>
          <table:table-cell table:style-name="PT_HeaderCell">
            <text:p text:style-name="PT_HeaderCellText">Value</text:p>
          </table:table-cell>
        </table:table-row>
        <table:table-row>
          <table:table-cell table:style-name="PT_BodyCell">
            <text:p text:style-name="PT_BodyCellTextCenter">DNS Server</text:p>
          </table:table-cell>
          <table:table-cell table:style-name="PT_BodyCell">
            <text:p text:style-name="PT_BodyCellText">10.21.32.43</text:p>
          </table:table-cell>
        </table:table-row>
        <table:table-row>
          <table:table-cell table:style-name="PT_BodyCellAlt">
            <text:p text:style-name="PT_BodyCellTextCenter">Primary Domain</text:p>
          </table:table-cell>
          <table:table-cell table:style-name="PT_BodyCellAlt">
            <text:p text:style-name="PT_BodyCellText">foomegahost.com</text:p>
          </table:table-cell>
        </table:table-row>
        <table:table-row>
          <table:table-cell table:style-name="PT_BodyCell">
            <text:p text:style-name="PT_BodyCellTextCenter">Resolved IP Address</text:p>
          </table:table-cell>
          <table:table-cell table:style-name="PT_BodyCell">
            <text:p text:style-name="PT_BodyCellText">65.61.137.117</text:p>
          </table:table-cell>
        </table:table-row>
        <table:table-row>
          <table:table-cell table:style-name="PT_BodyCellAlt">
            <text:p text:style-name="PT_BodyCellTextCenter">In-Scope Subdomains</text:p>
          </table:table-cell>
          <table:table-cell table:style-name="PT_BodyCellAlt">
            <text:p text:style-name="PT_BodyCellText">demo.testfire.net, altoro.testfire.net, testfire.net, www.testfire.net</text:p>
          </table:table-cell>
        </table:table-row>
        <table:table-row>
          <table:table-cell table:style-name="PT_BodyCell">
            <text:p text:style-name="PT_BodyCellTextCenter">Test Type</text:p>
          </table:table-cell>
          <table:table-cell table:style-name="PT_BodyCell">
            <text:p text:style-name="PT_BodyCellText">Black-Box, unauthenticated and authenticated web application testing</text:p>
          </table:table-cell>
        </table:table-row>
      </table:table>
      <text:p text:style-name="PT_Body"/>
      <text:h text:outline-level="2" text:style-name="PT_Heading2">1.2 Objectives of the Engagement</text:h>
      <text:p text:style-name="PT_Body">The objective of this engagement was to identify, validate, and document exploitable security weaknesses within the Altoro Mutual web application, to demonstrate their real-world impact through proof-of-concept evidence, and to provide actionable remediation guidance that the application owners can use to reduce risk to an acceptable level.</text:p>
      <text:h text:outline-level="2" text:style-name="PT_Heading2">1.3 Overall Risk Assessment</text:h>
      <text:p text:style-name="PT_Body">Each finding in this report has been rated using the Common Vulnerability Scoring System (CVSS) version 3.x framework, which derives a severity rating from the exploitability and impact characteristics of a vulnerability. During this assessment, one Critical-severity issue and three Medium-severity issues were identified within the four vulnerability classes selected for detailed reporting. The presence of an authentication-bypass SQL Injection flaw represents the most significant risk to the confidentiality and integrity of the application and should be remediated as a priority.</text:p>
      <text:p text:style-name="PageBreak1"/>
      <text:h text:outline-level="1" text:style-name="PT_Heading1">2. Methodology</text:h>
      <text:h text:outline-level="2" text:style-name="PT_Heading2">2.1 Assessment Type</text:h>
      <text:p text:style-name="PT_Body">This engagement was performed as an unauthenticated, black-box assessment. No source code, architecture diagrams, or credentials were provided in advance; all information used to identify and validate findings was gathered directly through reconnaissance and manual testing of the live application, consistent with the perspective of an external attacker.</text:p>
      <text:h text:outline-level="2" text:style-name="PT_Heading2">2.2 Risk Assessment Methodology</text:h>
      <text:p text:style-name="PT_Body">Vulnerabilities identified during testing were rated using CVSS v3.x base metrics, which combine an Exploitability sub-score (Attack Vector, Attack Complexity, Privileges Required, User Interaction) with an Impact sub-score (Confidentiality, Integrity, Availability) to produce an overall severity rating. The resulting ratings are mapped to the following scale:</text:p>
      <table:table table:name="RiskScaleTable" table:style-name="PT_Table">
        <table:table-column table:style-name="RiskScaleTable_col0"/>
        <table:table-column table:style-name="RiskScaleTable_col1"/>
        <table:table-column table:style-name="RiskScaleTable_col2"/>
        <table:table-row>
          <table:table-cell table:style-name="PT_HeaderCell">
            <text:p text:style-name="PT_HeaderCellText">Severity</text:p>
          </table:table-cell>
          <table:table-cell table:style-name="PT_HeaderCell">
            <text:p text:style-name="PT_HeaderCellText">CVSS Range</text:p>
          </table:table-cell>
          <table:table-cell table:style-name="PT_HeaderCell">
            <text:p text:style-name="PT_HeaderCellText">Description</text:p>
          </table:table-cell>
        </table:table-row>
        <table:table-row>
          <table:table-cell table:style-name="PT_CritCell">
            <text:p text:style-name="PT_CritCellText">Critical</text:p>
          </table:table-cell>
          <table:table-cell table:style-name="PT_BodyCell">
            <text:p text:style-name="PT_BodyCellText">9.0 – 10.0</text:p>
          </table:table-cell>
          <table:table-cell table:style-name="PT_BodyCell">
            <text:p text:style-name="PT_BodyCellText">Immediate exploitation risk with severe impact on confidentiality, integrity, or availability.</text:p>
          </table:table-cell>
        </table:table-row>
        <table:table-row>
          <table:table-cell table:style-name="PT_HighCell">
            <text:p text:style-name="PT_HighCellText">High</text:p>
          </table:table-cell>
          <table:table-cell table:style-name="PT_BodyCellAlt">
            <text:p text:style-name="PT_BodyCellText">7.0 – 8.9</text:p>
          </table:table-cell>
          <table:table-cell table:style-name="PT_BodyCellAlt">
            <text:p text:style-name="PT_BodyCellText">Significant risk requiring prompt remediation.</text:p>
          </table:table-cell>
        </table:table-row>
        <table:table-row>
          <table:table-cell table:style-name="PT_MedCell">
            <text:p text:style-name="PT_MedCellText">Medium</text:p>
          </table:table-cell>
          <table:table-cell table:style-name="PT_BodyCell">
            <text:p text:style-name="PT_BodyCellText">4.0 – 6.9</text:p>
          </table:table-cell>
          <table:table-cell table:style-name="PT_BodyCell">
            <text:p text:style-name="PT_BodyCellText">Moderate risk; should be remediated within a reasonable timeframe.</text:p>
          </table:table-cell>
        </table:table-row>
        <table:table-row>
          <table:table-cell table:style-name="PT_LowCell">
            <text:p text:style-name="PT_LowCellText">Low</text:p>
          </table:table-cell>
          <table:table-cell table:style-name="PT_BodyCellAlt">
            <text:p text:style-name="PT_BodyCellText">0.1 – 3.9</text:p>
          </table:table-cell>
          <table:table-cell table:style-name="PT_BodyCellAlt">
            <text:p text:style-name="PT_BodyCellText">Minor risk with limited exploitability or impact.</text:p>
          </table:table-cell>
        </table:table-row>
      </table:table>
      <text:p text:style-name="PT_Body"/>
      <text:p text:style-name="PageBreak1"/>
      <text:h text:outline-level="1" text:style-name="PT_Heading1">3. Summary of Findings</text:h>
      <text:p text:style-name="PT_Body">The table below summarizes the four vulnerability classes selected for detailed reporting in this document. Each was independently validated with a working proof of concept during testing.</text:p>
      <table:table table:name="FindingsSummaryTable" table:style-name="PT_Table">
        <table:table-column table:style-name="FindingsSummaryTable_col0"/>
        <table:table-column table:style-name="FindingsSummaryTable_col1"/>
        <table:table-column table:style-name="FindingsSummaryTable_col2"/>
        <table:table-column table:style-name="FindingsSummaryTable_col3"/>
        <table:table-row>
          <table:table-cell table:style-name="PT_HeaderCell">
            <text:p text:style-name="PT_HeaderCellText">ID</text:p>
          </table:table-cell>
          <table:table-cell table:style-name="PT_HeaderCell">
            <text:p text:style-name="PT_HeaderCellText">Vulnerability</text:p>
          </table:table-cell>
          <table:table-cell table:style-name="PT_HeaderCell">
            <text:p text:style-name="PT_HeaderCellText">Affected Location</text:p>
          </table:table-cell>
          <table:table-cell table:style-name="PT_HeaderCell">
            <text:p text:style-name="PT_HeaderCellText">Severity</text:p>
          </table:table-cell>
        </table:table-row>
        <table:table-row>
          <table:table-cell table:style-name="PT_BodyCell">
            <text:p text:style-name="PT_BodyCellTextCenter">1</text:p>
          </table:table-cell>
          <table:table-cell table:style-name="PT_BodyCell">
            <text:p text:style-name="PT_BodyCellText">SQL Injection – Authentication Bypass</text:p>
          </table:table-cell>
          <table:table-cell table:style-name="PT_BodyCell">
            <text:p text:style-name="PT_BodyCellText">/login.jsp</text:p>
          </table:table-cell>
          <table:table-cell table:style-name="PT_CritCell">
            <text:p text:style-name="PT_CritCellText">Critical</text:p>
          </table:table-cell>
        </table:table-row>
        <table:table-row>
          <table:table-cell table:style-name="PT_BodyCellAlt">
            <text:p text:style-name="PT_BodyCellTextCenter">2</text:p>
          </table:table-cell>
          <table:table-cell table:style-name="PT_BodyCellAlt">
            <text:p text:style-name="PT_BodyCellText">Cross-Site Scripting (Reflected)</text:p>
          </table:table-cell>
          <table:table-cell table:style-name="PT_BodyCellAlt">
            <text:p text:style-name="PT_BodyCellText">/search.jsp, /feedback.jsp</text:p>
          </table:table-cell>
          <table:table-cell table:style-name="PT_MedCell">
            <text:p text:style-name="PT_MedCellText">Medium</text:p>
          </table:table-cell>
        </table:table-row>
        <table:table-row>
          <table:table-cell table:style-name="PT_BodyCell">
            <text:p text:style-name="PT_BodyCellTextCenter">3</text:p>
          </table:table-cell>
          <table:table-cell table:style-name="PT_BodyCell">
            <text:p text:style-name="PT_BodyCellText">HTML Injection</text:p>
          </table:table-cell>
          <table:table-cell table:style-name="PT_BodyCell">
            <text:p text:style-name="PT_BodyCellText">/index.jsp</text:p>
          </table:table-cell>
          <table:table-cell table:style-name="PT_MedCell">
            <text:p text:style-name="PT_MedCellText">Medium</text:p>
          </table:table-cell>
        </table:table-row>
        <table:table-row>
          <table:table-cell table:style-name="PT_BodyCellAlt">
            <text:p text:style-name="PT_BodyCellTextCenter">4</text:p>
          </table:table-cell>
          <table:table-cell table:style-name="PT_BodyCellAlt">
            <text:p text:style-name="PT_BodyCellText">Clickjacking</text:p>
          </table:table-cell>
          <table:table-cell table:style-name="PT_BodyCellAlt">
            <text:p text:style-name="PT_BodyCellText">/index.jsp</text:p>
          </table:table-cell>
          <table:table-cell table:style-name="PT_MedCell">
            <text:p text:style-name="PT_MedCellText">Medium</text:p>
          </table:table-cell>
        </table:table-row>
      </table:table>
      <text:p text:style-name="PT_Body"/>
      <text:p text:style-name="PageBreak1"/>
      <text:h text:outline-level="1" text:style-name="PT_Heading1">4. Test Scenario / Reconnaissance</text:h>
      <text:p text:style-name="PT_Body">Testing began with a review of the engagement's rules of engagement to confirm the authorized scope, deliverables, and reporting requirements. The confirmed scope covered the primary domain altoro.testfire.net and its associated DNS host at 65.61.137.117, along with any discoverable subdomains.</text:p>
      <text:p text:style-name="PT_Body">Reconnaissance was then carried out using passive subdomain enumeration to map the external attack surface prior to active testing. This activity identified four in-scope hosts: demo.testfire.net, altoro.testfire.net, testfire.net, and www.testfire.net.</text:p>
      <text:p text:style-name="PT_Placeholder">📷  Insert Screenshot – Subdomain Enumeration Output</text:p>
      <text:p text:style-name="PT_Body">With the attack surface confirmed, testing proceeded to manual and tool-assisted analysis of each application entry point, including input fields, URL parameters, and transactional workflows, to identify exploitable weaknesses. The four findings selected for detailed reporting are documented in Section 5.</text:p>
      <text:p text:style-name="PageBreak1"/>
      <text:h text:outline-level="1" text:style-name="PT_Heading1">5. Detailed Findings</text:h>
      <text:h text:outline-level="2" text:style-name="PT_Heading2">5.1 Cross-Site Scripting (XSS) – Reflected</text:h>
      <text:p text:style-name="PT_Body"><text:span text:style-name="SpanBold">Finding ID: </text:span>1</text:p>
      <text:p text:style-name="PT_Body">Severity:  <text:span text:style-name="SpanMedium">Medium</text:span></text:p>
      <text:p text:style-name="PT_Body"><text:span text:style-name="SpanBold">CVSS 3.x Vector: </text:span>CVSS:3.0/AV:N/AC:L/PR:N/UI:R/S:C/C:L/I:L/A:N</text:p>
      <text:p text:style-name="PT_Body"><text:span text:style-name="SpanBold">Affected URLs: </text:span>http://altoro.testfire.net/search.jsp, http://altoro.testfire.net/feedback.jsp, http://altoro.testfire.net/customize.jsp</text:p>
      <text:p text:style-name="PT_Body"><text:span text:style-name="SpanBold">Vulnerable Parameters: </text:span>query (search.jsp), Your Name field (feedback.jsp), lang (customize.jsp)</text:p>
      <text:h text:outline-level="3" text:style-name="PT_Heading3">Description</text:h>
      <text:p text:style-name="PT_Body">The application reflects user-supplied input back into the rendered HTML response without adequate output encoding or input sanitization. Because the search, feedback, and site-language customization features each echo attacker-controlled values directly into the page, an attacker can craft a malicious link or form submission containing embedded script code. When a victim follows that link or submits the crafted request, the injected script executes in the context of the victim's browser session, under the trust boundary of the Altoro Mutual domain.</text:p>
      <text:h text:outline-level="3" text:style-name="PT_Heading3">Business Impact</text:h>
      <text:p text:style-name="PT_Body">Reflected XSS allows an attacker to execute arbitrary JavaScript in a victim's browser session. In a banking context this could be leveraged to hijack an authenticated session, harvest credentials via a fake login overlay, silently redirect the victim to a phishing page, or perform actions on the victim's behalf within the application. Because exploitation depends on a victim interacting with a crafted link, the attack requires social engineering but can still lead to significant compromise of individual customer accounts.</text:p>
      <text:h text:outline-level="3" text:style-name="PT_Heading3">Proof of Concept</text:h>
      <text:p text:style-name="PT_Body">The following steps were used to validate the finding on the search functionality:</text:p>
      <text:p text:style-name="PT_Bullet">•  Navigated to the Altoro Mutual site search feature at /search.jsp.</text:p>
      <text:p text:style-name="PT_Bullet">•  Submitted a test script payload of alert("XSS_Vuln") through the search query field.</text:p>
      <text:p text:style-name="PT_Bullet">•  Observed that the payload executed immediately, producing a browser alert dialog, which confirmed the query parameter was reflected without encoding.</text:p>
      <text:p text:style-name="PT_Bullet">•  Repeated the test against the feedback form's Name field and confirmed the same behavior, and separately confirmed that the customize.jsp lang parameter and the feedback form are similarly susceptible to injected markup.</text:p>
      <text:p text:style-name="PT_Placeholder">📷  Insert Screenshot – Reflected XSS Alert on search.jsp (query parameter)</text:p>
      <text:p text:style-name="PT_Placeholder">📷  Insert Screenshot – Reflected XSS Alert on feedback.jsp (Name field)</text:p>
      <text:h text:outline-level="3" text:style-name="PT_Heading3">Recommendation</text:h>
      <text:p text:style-name="PT_Body">Treat all user-supplied input as untrusted. Apply strict, allow-list-based input validation at the point of entry, and apply context-appropriate output encoding (HTML entity encoding for content rendered into HTML, JavaScript encoding for content rendered into script contexts) immediately before any user-controllable value is written into a response. Consider deploying a Content-Security-Policy header as a defense-in-depth control to limit the impact of any script injection that bypasses input handling.</text:p>
      <text:p text:style-name="PageBreak1"/>
      <text:h text:outline-level="2" text:style-name="PT_Heading2">5.2 SQL Injection – Authentication Bypass</text:h>
      <text:p text:style-name="PT_Body"><text:span text:style-name="SpanBold">Finding ID: </text:span>2</text:p>
      <text:p text:style-name="PT_Body">Severity:  <text:span text:style-name="SpanCritical">Critical</text:span></text:p>
      <text:p text:style-name="PT_Body"><text:span text:style-name="SpanBold">CVSS 3.x Vector: </text:span>CVSS:3.0/AV:N/AC:L/PR:N/UI:N/S:U/C:H/I:H/A:N</text:p>
      <text:p text:style-name="PT_Body"><text:span text:style-name="SpanBold">Affected URL: </text:span>http://altoro.testfire.net/login.jsp</text:p>
      <text:p text:style-name="PT_Body"><text:span text:style-name="SpanBold">Vulnerable Parameter: </text:span>Username field (login form)</text:p>
      <text:h text:outline-level="3" text:style-name="PT_Heading3">Description</text:h>
      <text:p text:style-name="PT_Body">The login form does not properly validate or parameterize the credentials submitted by users before incorporating them into the backend SQL authentication query. As a result, an attacker can insert SQL syntax into the username field to alter the logic of the query itself, causing the authentication check to always evaluate as true regardless of whether a valid password was supplied.</text:p>
      <text:h text:outline-level="3" text:style-name="PT_Heading3">Business Impact</text:h>
      <text:p text:style-name="PT_Body">This is the most severe finding in this assessment. Successful exploitation grants an unauthenticated attacker full administrative access to the online banking application without any valid credentials. From this position an attacker could view customer account data, manipulate account records, or pivot further into the application's administrative functionality. This finding directly threatens the confidentiality and integrity of all data managed by the application and should be treated as a priority-one remediation item.</text:p>
      <text:h text:outline-level="3" text:style-name="PT_Heading3">Proof of Concept</text:h>
      <text:p text:style-name="PT_Body">Authentication bypass was demonstrated as follows:</text:p>
      <text:p text:style-name="PT_Bullet">•  Navigated to the login page at /login.jsp.</text:p>
      <text:p text:style-name="PT_Bullet">•  Entered the string ' or 1=1 -- in the Username field, leaving the Password field populated with an arbitrary value.</text:p>
      <text:p text:style-name="PT_Bullet">•  Submitted the login form.</text:p>
      <text:p text:style-name="PT_Bullet">•  The application authenticated the request and returned the session as an administrative user, confirming the query was successfully manipulated to bypass the credential check.</text:p>
      <text:p text:style-name="PT_Placeholder">📷  Insert Screenshot – SQL Injection Payload Submitted on Login Form</text:p>
      <text:p text:style-name="PT_Placeholder">📷  Insert Screenshot – Resulting Authenticated Administrator Session</text:p>
      <text:h text:outline-level="3" text:style-name="PT_Heading3">Recommendation</text:h>
      <text:p text:style-name="PT_Body">Eliminate dynamic SQL string concatenation of user input. All database queries should use parameterized statements or prepared statements so that user-supplied values are always treated as data rather than executable query logic. In addition, enforce strict server-side input validation on the login form, apply the principle of least privilege to the database account used by the application, and monitor authentication logs for anomalous login patterns.</text:p>
      <text:p text:style-name="PageBreak1"/>
      <text:h text:outline-level="2" text:style-name="PT_Heading2">5.3 HTML Injection</text:h>
      <text:p text:style-name="PT_Body"><text:span text:style-name="SpanBold">Finding ID: </text:span>3</text:p>
      <text:p text:style-name="PT_Body">Severity:  <text:span text:style-name="SpanMedium">Medium</text:span></text:p>
      <text:p text:style-name="PT_Body"><text:span text:style-name="SpanBold">CVSS 3.x Vector: </text:span>CVSS:3.0/AV:N/AC:L/PR:N/UI:R/S:U/C:N/I:L/A:N</text:p>
      <text:p text:style-name="PT_Body"><text:span text:style-name="SpanBold">Affected URL: </text:span>http://altoro.testfire.net/index.jsp</text:p>
      <text:p text:style-name="PT_Body"><text:span text:style-name="SpanBold">Vulnerable Parameter: </text:span>query</text:p>
      <text:h text:outline-level="3" text:style-name="PT_Heading3">Description</text:h>
      <text:p text:style-name="PT_Body">The application's search results page inserts the value of the query parameter directly into the returned HTML document without sanitizing or encoding HTML markup characters. This allows an attacker to inject arbitrary HTML elements that the browser will render as part of the page's structure, rather than treating the input as plain text.</text:p>
      <text:h text:outline-level="3" text:style-name="PT_Heading3">Business Impact</text:h>
      <text:p text:style-name="PT_Body">An attacker able to inject arbitrary HTML into a trusted page can alter the visual layout and content presented to victims, insert deceptive forms or branding to harvest credentials, or embed content that redirects users toward attacker-controlled destinations. Although this finding does not permit script execution on its own, it can materially damage user trust in the legitimacy of the page and serves as a common building block for phishing campaigns.</text:p>
      <text:h text:outline-level="3" text:style-name="PT_Heading3">Proof of Concept</text:h>
      <text:p text:style-name="PT_Body">HTML injection was validated as follows:</text:p>
      <text:p text:style-name="PT_Bullet">•  Navigated to the search functionality at /index.jsp.</text:p>
      <text:p text:style-name="PT_Bullet">•  Submitted the markup &lt;h1&gt;&lt;i&gt;Hacked&lt;/i&gt;&lt;/h1&gt; as the search query value.</text:p>
      <text:p text:style-name="PT_Bullet">•  The response rendered the injected markup as live, formatted HTML content on the results page rather than displaying it as literal text, confirming the lack of output encoding.</text:p>
      <text:p text:style-name="PT_Placeholder">📷  Insert Screenshot – Injected HTML Rendered on Search Results Page</text:p>
      <text:h text:outline-level="3" text:style-name="PT_Heading3">Recommendation</text:h>
      <text:p text:style-name="PT_Body">Apply HTML entity encoding to all user-supplied values before they are written into an HTML response, so that characters such as &lt; and &gt; are rendered as literal text rather than interpreted as markup. Where rich text input is a legitimate business requirement, use a well-maintained HTML sanitization library configured with a strict allow-list of permitted tags and attributes rather than attempting to filter individual payloads.</text:p>
      <text:p text:style-name="PageBreak1"/>
      <text:h text:outline-level="2" text:style-name="PT_Heading2">5.4 Clickjacking</text:h>
      <text:p text:style-name="PT_Body"><text:span text:style-name="SpanBold">Finding ID: </text:span>4</text:p>
      <text:p text:style-name="PT_Body">Severity:  <text:span text:style-name="SpanMedium">Medium</text:span></text:p>
      <text:p text:style-name="PT_Body"><text:span text:style-name="SpanBold">CVSS 3.x Vector: </text:span>CVSS:3.0/AV:N/AC:L/PR:N/UI:R/S:C/C:L/I:L/A:N</text:p>
      <text:p text:style-name="PT_Body"><text:span text:style-name="SpanBold">Affected URL: </text:span>http://altoro.testfire.net/index.jsp</text:p>
      <text:p text:style-name="PT_Body"><text:span text:style-name="SpanBold">Vulnerable Parameter: </text:span>N/A – missing response header control</text:p>
      <text:h text:outline-level="3" text:style-name="PT_Heading3">Description</text:h>
      <text:p text:style-name="PT_Body">The application does not return an X-Frame-Options header or an equivalent Content-Security-Policy frame-ancestors directive on its response headers. Without this control, the page can be loaded inside an HTML iframe hosted on an attacker-controlled website. During testing, the Altoro Mutual page was successfully embedded within an iframe on an arbitrary external page, confirming that no framing protection is enforced.</text:p>
      <text:h text:outline-level="3" text:style-name="PT_Heading3">Business Impact</text:h>
      <text:p text:style-name="PT_Body">When a page can be framed by a third-party site, an attacker can overlay invisible or disguised interactive elements on top of the legitimate application to trick a logged-in victim into clicking buttons or links they did not intend to activate. Depending on the functionality exposed on the framed page, this could be used to trick users into unknowingly submitting a form, changing an account setting, or authorizing a transaction while believing they are interacting with an unrelated, attacker-controlled page.</text:p>
      <text:h text:outline-level="3" text:style-name="PT_Heading3">Proof of Concept</text:h>
      <text:p text:style-name="PT_Body">Framing susceptibility was demonstrated as follows:</text:p>
      <text:p text:style-name="PT_Bullet">•  Constructed a proof-of-concept HTML page containing an iframe element with its src attribute pointing to the Altoro Mutual site.</text:p>
      <text:p text:style-name="PT_Bullet">•  Loaded the proof-of-concept page in a browser.</text:p>
      <text:p text:style-name="PT_Bullet">•  Confirmed that the Altoro Mutual page rendered fully within the iframe with no framebusting script or header blocking the request.</text:p>
      <text:p text:style-name="PT_Placeholder">📷  Insert Screenshot – Altoro Mutual Page Rendered Inside Attacker-Controlled iframe</text:p>
      <text:h text:outline-level="3" text:style-name="PT_Heading3">Recommendation</text:h>
      <text:p text:style-name="PT_Body">Configure the web server or application to return the response header X-Frame-Options: DENY (or SAMEORIGIN if legitimate same-site framing is required), and additionally implement a Content-Security-Policy header using the frame-ancestors directive, which is supported by modern browsers and provides more granular control than X-Frame-Options alone.</text:p>
      <text:p text:style-name="PageBreak1"/>
      <text:h text:outline-level="1" text:style-name="PT_Heading1">6. Conclusion</text:h>
      <text:p text:style-name="PT_Body">This assessment identified one Critical and three Medium severity findings within the four vulnerability classes documented in this report. The Critical SQL Injection authentication bypass on the login page represents an immediate and severe risk that grants unauthenticated administrative access to the application and should be remediated before any other finding in this document. The remaining Medium-severity findings — Reflected XSS, HTML Injection, and Clickjacking — share a common root cause of insufficient input validation and output encoding, and should be addressed as part of a broader secure-coding review of all user-input handling across the application. Applying the remediation guidance provided for each finding will materially reduce the application's exposure to the attack techniques demonstrated during this engagement.</text:p>
      <text:p text:style-name="PageBreak1"/>
      <text:h text:outline-level="1" text:style-name="PT_Heading1">7. Document Revision History</text:h>
      <table:table table:name="RevisionTable" table:style-name="PT_Table">
        <table:table-column table:style-name="RevisionTable_col0"/>
        <table:table-column table:style-name="RevisionTable_col1"/>
        <table:table-column table:style-name="RevisionTable_col2"/>
        <table:table-column table:style-name="RevisionTable_col3"/>
        <table:table-row>
          <table:table-cell table:style-name="PT_HeaderCell">
            <text:p text:style-name="PT_HeaderCellText">Version</text:p>
          </table:table-cell>
          <table:table-cell table:style-name="PT_HeaderCell">
            <text:p text:style-name="PT_HeaderCellText">Date</text:p>
          </table:table-cell>
          <table:table-cell table:style-name="PT_HeaderCell">
            <text:p text:style-name="PT_HeaderCellText">Author</text:p>
          </table:table-cell>
          <table:table-cell table:style-name="PT_HeaderCell">
            <text:p text:style-name="PT_HeaderCellText">Description</text:p>
          </table:table-cell>
        </table:table-row>
        <table:table-row>
          <table:table-cell table:style-name="PT_BodyCell">
            <text:p text:style-name="PT_BodyCellTextCenter">1.0</text:p>
          </table:table-cell>
          <table:table-cell table:style-name="PT_BodyCell">
            <text:p text:style-name="PT_BodyCellText">July 2026</text:p>
          </table:table-cell>
          <table:table-cell table:style-name="PT_BodyCell">
            <text:p text:style-name="PT_BodyCellText">TCS Cybersecurity Engineering</text:p>
          </table:table-cell>
          <table:table-cell table:style-name="PT_BodyCell">
            <text:p text:style-name="PT_BodyCellText">Initial final report issued.</text:p>
          </table:table-cell>
        </table:table-row>
      </table:table>
      <text:p text:style-name="PT_Body"/>
      <text:h text:outline-level="1" text:style-name="PT_Heading1">8. Contacts</text:h>
      <table:table table:name="ContactsTable" table:style-name="PT_Table">
        <table:table-column table:style-name="ContactsTable_col0"/>
        <table:table-column table:style-name="ContactsTable_col1"/>
        <table:table-column table:style-name="ContactsTable_col2"/>
        <table:table-row>
          <table:table-cell table:style-name="PT_HeaderCell">
            <text:p text:style-name="PT_HeaderCellText">Name</text:p>
          </table:table-cell>
          <table:table-cell table:style-name="PT_HeaderCell">
            <text:p text:style-name="PT_HeaderCellText">Role</text:p>
          </table:table-cell>
          <table:table-cell table:style-name="PT_HeaderCell">
            <text:p text:style-name="PT_HeaderCellText">Contact</text:p>
          </table:table-cell>
        </table:table-row>
        <table:table-row>
          <table:table-cell table:style-name="PT_BodyCell">
            <text:p text:style-name="PT_BodyCellTextCenter">[Insert Name]</text:p>
          </table:table-cell>
          <table:table-cell table:style-name="PT_BodyCell">
            <text:p text:style-name="PT_BodyCellText">Lead Penetration Tester</text:p>
          </table:table-cell>
          <table:table-cell table:style-name="PT_BodyCell">
            <text:p text:style-name="PT_BodyCellText">[Insert Email]</text:p>
          </table:table-cell>
        </table:table-row>
        <table:table-row>
          <table:table-cell table:style-name="PT_BodyCellAlt">
            <text:p text:style-name="PT_BodyCellTextCenter">[Insert Name]</text:p>
          </table:table-cell>
          <table:table-cell table:style-name="PT_BodyCellAlt">
            <text:p text:style-name="PT_BodyCellText">Engagement Manager</text:p>
          </table:table-cell>
          <table:table-cell table:style-name="PT_BodyCellAlt">
            <text:p text:style-name="PT_BodyCellText">[Insert Email]</text:p>
          </table:table-cell>
        </table:table-row>
      </table:table>
      <text:p text:style-name="PT_Body"/>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HeaderContent" style:family="paragraph" style:display-name="HeaderContent">
      <style:paragraph-properties fo:text-align="end" fo:border-bottom="0.5pt solid #1F3864" fo:padding-bottom="0.1cm"/>
      <style:text-properties fo:font-size="9pt" fo:color="#404040" fo:font-weight="bold"/>
    </style:style>
    <style:style style:name="FooterContent" style:family="paragraph" style:display-name="FooterContent">
      <style:paragraph-properties fo:text-align="center" fo:border-top="0.5pt solid #1F3864" fo:padding-top="0.1cm"/>
      <style:text-properties fo:font-size="9pt" fo:color="#404040"/>
    </style:style>
    <style:style style:name="CoverTitle" style:family="paragraph" style:display-name="CoverTitle">
      <style:paragraph-properties fo:text-align="left" fo:margin-bottom="0.3cm"/>
      <style:text-properties fo:font-size="32pt" fo:font-weight="bold" fo:color="#FFFFFF" fo:font-family="Calibri"/>
    </style:style>
    <style:style style:name="CoverSub" style:family="paragraph" style:display-name="CoverSub">
      <style:paragraph-properties fo:text-align="left" fo:margin-bottom="0.2cm"/>
      <style:text-properties fo:font-size="13pt" fo:color="#1F3864" fo:font-family="Calibri"/>
    </style:style>
    <style:style style:name="CoverMeta" style:family="paragraph" style:display-name="CoverMeta">
      <style:paragraph-properties fo:text-align="left" fo:margin-bottom="0.15cm" fo:margin-top="0.6cm"/>
      <style:text-properties fo:font-size="12pt" fo:color="#7030A0" fo:font-family="Calibri"/>
    </style:style>
    <style:style style:name="PT_Heading1" style:family="paragraph" style:display-name="PT_Heading1">
      <style:paragraph-properties fo:margin-bottom="0.35cm" fo:margin-top="0.7cm" fo:border-bottom="1.5pt solid #2E75B6" fo:padding-bottom="0.1cm"/>
      <style:text-properties fo:font-size="20pt" fo:font-weight="bold" fo:color="#2E75B6" fo:font-family="Calibri"/>
    </style:style>
    <style:style style:name="PT_Heading2" style:family="paragraph" style:display-name="PT_Heading2">
      <style:paragraph-properties fo:margin-bottom="0.25cm" fo:margin-top="0.5cm"/>
      <style:text-properties fo:font-size="14pt" fo:font-weight="bold" fo:color="#1F3864" fo:font-family="Calibri"/>
    </style:style>
    <style:style style:name="PT_Heading3" style:family="paragraph" style:display-name="PT_Heading3">
      <style:paragraph-properties fo:margin-bottom="0.15cm" fo:margin-top="0.35cm"/>
      <style:text-properties fo:font-size="12pt" fo:font-weight="bold" fo:color="#1F3864" fo:font-family="Calibri"/>
    </style:style>
    <style:style style:name="PT_Body" style:family="paragraph" style:display-name="PT_Body">
      <style:paragraph-properties fo:margin-bottom="0.25cm" fo:text-align="justify" fo:line-height="130%"/>
      <style:text-properties fo:font-size="10.5pt" fo:font-family="Calibri" fo:color="#262626"/>
    </style:style>
    <style:style style:name="PT_Label" style:family="paragraph" style:display-name="PT_Label">
      <style:paragraph-properties fo:margin-bottom="0.15cm"/>
      <style:text-properties fo:font-size="10.5pt" fo:font-family="Calibri" fo:font-weight="bold" fo:color="#1F3864"/>
    </style:style>
    <style:style style:name="PT_Bullet" style:family="paragraph" style:display-name="PT_Bullet">
      <style:paragraph-properties fo:margin-left="0.6cm" fo:margin-bottom="0.12cm"/>
      <style:text-properties fo:font-size="10.5pt" fo:font-family="Calibri"/>
    </style:style>
    <style:style style:name="PT_Placeholder" style:family="paragraph" style:display-name="PT_Placeholder">
      <style:paragraph-properties fo:margin-bottom="0.35cm" fo:margin-top="0.15cm" fo:text-align="center" fo:border="1pt dashed #2E75B6" fo:padding="0.3cm" fo:background-color="#F2F6FC"/>
      <style:text-properties fo:font-size="10pt" fo:font-family="Calibri" fo:font-style="italic" fo:color="#2E75B6" fo:font-weight="bold"/>
    </style:style>
    <style:style style:name="PT_TOCEntry" style:family="paragraph" style:display-name="PT_TOCEntry">
      <style:paragraph-properties fo:margin-bottom="0.2cm"/>
      <style:text-properties fo:font-size="11pt" fo:font-family="Calibri"/>
    </style:style>
    <style:style style:name="SpanBold" style:family="text" style:display-name="SpanBold">
      <style:text-properties fo:font-weight="bold"/>
    </style:style>
    <style:style style:name="SpanItalic" style:family="text" style:display-name="SpanItalic">
      <style:text-properties fo:font-style="italic"/>
    </style:style>
    <style:style style:name="SpanRedBold" style:family="text" style:display-name="SpanRedBold">
      <style:text-properties fo:font-weight="bold" fo:color="#C00000"/>
    </style:style>
    <style:style style:name="SpanMono" style:family="text" style:display-name="SpanMono">
      <style:text-properties fo:font-family="Consolas" fo:font-size="9.5pt" fo:color="#C00000" fo:background-color="#F2F2F2"/>
    </style:style>
    <style:style style:name="SpanCritical" style:family="text" style:display-name="SpanCritical">
      <style:text-properties fo:font-weight="bold" fo:color="#FFFFFF" fo:background-color="#7030A0"/>
    </style:style>
    <style:style style:name="SpanHigh" style:family="text" style:display-name="SpanHigh">
      <style:text-properties fo:font-weight="bold" fo:color="#FFFFFF" fo:background-color="#FF0000"/>
    </style:style>
    <style:style style:name="SpanMedium" style:family="text" style:display-name="SpanMedium">
      <style:text-properties fo:font-weight="bold" fo:color="#000000" fo:background-color="#FFA500"/>
    </style:style>
    <style:style style:name="SpanLow" style:family="text" style:display-name="SpanLow">
      <style:text-properties fo:font-weight="bold" fo:color="#000000" fo:background-color="#FFFF00"/>
    </style:style>
    <style:style style:name="PT_HeaderCellText" style:family="paragraph" style:display-name="PT_HeaderCellText">
      <style:paragraph-properties fo:text-align="center"/>
      <style:text-properties fo:font-weight="bold" fo:color="#FFFFFF" fo:font-size="10pt" fo:font-family="Calibri"/>
    </style:style>
    <style:style style:name="PT_BodyCellText" style:family="paragraph" style:display-name="PT_BodyCellText">
      <style:paragraph-properties fo:text-align="left"/>
      <style:text-properties fo:font-size="10pt" fo:font-family="Calibri"/>
    </style:style>
    <style:style style:name="PT_BodyCellTextCenter" style:family="paragraph" style:display-name="PT_BodyCellTextCenter">
      <style:paragraph-properties fo:text-align="center"/>
      <style:text-properties fo:font-size="10pt" fo:font-family="Calibri"/>
    </style:style>
    <style:style style:name="PT_CritCellText" style:family="paragraph" style:display-name="PT_CritCellText">
      <style:paragraph-properties fo:text-align="center"/>
      <style:text-properties fo:font-weight="bold" fo:color="#FFFFFF" fo:font-size="10pt" fo:font-family="Calibri"/>
    </style:style>
    <style:style style:name="PT_HighCellText" style:family="paragraph" style:display-name="PT_HighCellText">
      <style:paragraph-properties fo:text-align="center"/>
      <style:text-properties fo:font-weight="bold" fo:color="#FFFFFF" fo:font-size="10pt" fo:font-family="Calibri"/>
    </style:style>
    <style:style style:name="PT_MedCellText" style:family="paragraph" style:display-name="PT_MedCellText">
      <style:paragraph-properties fo:text-align="center"/>
      <style:text-properties fo:font-weight="bold" fo:color="#000000" fo:font-size="10pt" fo:font-family="Calibri"/>
    </style:style>
    <style:style style:name="PT_LowCellText" style:family="paragraph" style:display-name="PT_LowCellText">
      <style:paragraph-properties fo:text-align="center"/>
      <style:text-properties fo:font-weight="bold" fo:color="#000000" fo:font-size="10pt" fo:font-family="Calibri"/>
    </style:style>
    <style:style style:name="CoverBgPara" style:family="paragraph" style:display-name="CoverBgPara">
      <style:paragraph-properties fo:margin-top="6cm"/>
    </style:style>
    <style:style style:name="CoverBanner" style:family="paragraph" style:display-name="CoverBanner">
      <style:paragraph-properties fo:background-color="#1F3864" fo:padding="1.2cm" fo:margin-top="3cm" fo:margin-bottom="1cm"/>
    </style:style>
    <style:style style:name="BannerTitleSpan" style:family="text" style:display-name="BannerTitleSpan">
      <style:text-properties fo:font-size="30pt" fo:font-weight="bold" fo:color="#FFFFFF" fo:font-family="Calibri"/>
    </style:style>
    <style:style style:name="BannerSubSpan" style:family="text" style:display-name="BannerSubSpan">
      <style:text-properties fo:font-size="13pt" fo:color="#D9E2F3" fo:font-family="Calibri"/>
    </style:style>
    <style:style style:name="CoverBanner2" style:family="paragraph" style:display-name="CoverBanner2">
      <style:paragraph-properties fo:background-color="#1F3864" fo:padding-left="1.2cm" fo:padding-right="1.2cm" fo:padding-bottom="1.2cm"/>
    </style:style>
    <style:style style:name="MetaLabelSpan" style:family="text" style:display-name="MetaLabelSpan">
      <style:text-properties fo:font-weight="bold" fo:color="#1F3864" fo:font-size="11pt"/>
    </style:style>
    <style:style style:name="MetaValSpan" style:family="text" style:display-name="MetaValSpan">
      <style:text-properties fo:color="#262626" fo:font-size="11pt"/>
    </style:style>
    <style:style style:name="CoverDisclaimer" style:family="paragraph" style:display-name="CoverDisclaimer">
      <style:paragraph-properties fo:margin-top="2cm" fo:border-top="0.5pt solid #B4C6E7" fo:padding-top="0.3cm"/>
      <style:text-properties fo:font-size="9pt" fo:font-style="italic" fo:color="#7F7F7F"/>
    </style:style>
    <style:style style:name="PageBreak1" style:family="paragraph" style:display-name="PageBreak1">
      <style:paragraph-properties fo:break-before="page"/>
    </style:style>
  </office:styles>
  <office:automatic-styles>
    <style:page-layout style:name="PT_Layout">
      <style:page-layout-properties fo:page-width="21.001cm" fo:page-height="29.7cm" fo:margin-top="2.2cm" fo:margin-bottom="2cm" fo:margin-left="2.2cm" fo:margin-right="2.2cm" style:print-orientation="portrait"/>
    </style:page-layout>
  </office:automatic-styles>
  <office:master-styles>
    <style:master-page style:name="Standard" style:page-layout-name="PT_Layout" style:display-name="Standard">
      <style:header>
        <text:p text:style-name="HeaderContent">Penetration Test Report – Altoro Mutual | CONFIDENTIAL</text:p>
      </style:header>
      <style:footer>
        <text:p text:style-name="FooterContent">TCS Cybersecurity Engineering – Final Report   |   Page <text:page-number text:select-page="current"/></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